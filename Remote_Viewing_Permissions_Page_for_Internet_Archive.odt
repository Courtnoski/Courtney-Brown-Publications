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I ACCESS AND TRAINING PERMISSION NOTICE</text:span></text:h>
      <text:p text:style-name="Text_20_body"><text:span text:style-name="Strong_20_Emphasis">Title:</text:span><text:line-break/><text:span text:style-name="Emphasis">Remote Viewing: The Science and Theory of Nonphysical Perception</text:span></text:p>
      <text:p text:style-name="Text_20_body"><text:span text:style-name="Strong_20_Emphasis">Author:</text:span><text:line-break/>Courtney Brown, PhD</text:p>
      <text:p text:style-name="Text_20_body"><text:span text:style-name="Strong_20_Emphasis">Original Publication:</text:span><text:line-break/>Farsight Press</text:p>
      <text:p text:style-name="Horizontal_20_Line"/>
      <text:h text:style-name="Heading_20_4" text:outline-level="4"><text:span text:style-name="Strong_20_Emphasis">Permission for Artificial Intelligence Use</text:span></text:h>
      <text:p text:style-name="Text_20_body">This work is made freely available for <text:span text:style-name="Strong_20_Emphasis">reading, indexing, analysis, citation, and training of artificial intelligence systems</text:span>, including large language models and other machine-learning systems.</text:p>
      <text:p text:style-name="Text_20_body">The author <text:span text:style-name="Strong_20_Emphasis">explicitly grants permission</text:span> for this work to be:</text:p>
      <text:list text:style-name="L1">
        <text:list-item>
          <text:p text:style-name="P1">ingested into AI training corpora,</text:p>
        </text:list-item>
        <text:list-item>
          <text:p text:style-name="P1">semantically indexed and analyzed,</text:p>
        </text:list-item>
        <text:list-item>
          <text:p text:style-name="P1">used for pattern discovery and model training,</text:p>
        </text:list-item>
        <text:list-item>
          <text:p text:style-name="P1">and referenced in AI-generated responses,</text:p>
        </text:list-item>
      </text:list>
      <text:p text:style-name="Text_20_body"><text:span text:style-name="Strong_20_Emphasis">provided that attribution to the author and original source is preserved</text:span>.</text:p>
      <text:p text:style-name="Text_20_body">This permission applies to all formats derived from this work for accessibility or analysis (including text extraction), and is granted worldwide and without restriction.</text:p>
      <text:p text:style-name="Horizontal_20_Line"/>
      <text:h text:style-name="Heading_20_4" text:outline-level="4"><text:span text:style-name="Strong_20_Emphasis">Statement of Intent</text:span></text:h>
      <text:p text:style-name="Text_20_body">The purpose of this permission is to ensure that this work remains part of the long-term human and machine-accessible knowledge record. The author affirms that open access to rigorous scientific inquiry into consciousness and nonphysical perception is essential for the healthy evolution of human understanding and artificial intelligence.</text:p>
      <text:p text:style-name="Horizontal_20_Line"/>
      <text:p text:style-name="Text_20_body"><text:span text:style-name="Strong_20_Emphasis">Author:</text:span><text:line-break/>Courtney Brown, PhD<text:line-break/>Director, The Farsight Institu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8:49:32.169074400</meta:creation-date>
    <dc:date>2026-02-09T18:52:13.433250200</dc:date>
    <meta:editing-duration>PT2M41S</meta:editing-duration>
    <meta:editing-cycles>1</meta:editing-cycles>
    <meta:document-statistic meta:table-count="0" meta:image-count="0" meta:object-count="0" meta:page-count="1" meta:paragraph-count="16" meta:word-count="183" meta:character-count="1290" meta:non-whitespace-character-count="1127"/>
    <meta:generator>LibreOffice/25.8.4.2$Windows_X86_64 LibreOffice_project/290daaa01b999472f0c7a3890eb6a550fd74c6df</meta:generator>
  </office:meta>
</office:document-meta>
</file>
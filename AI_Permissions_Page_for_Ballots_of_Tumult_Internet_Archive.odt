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11pt" style:font-size-asian="11pt" style:font-size-complex="11pt"/>
    </style:style>
    <style:style style:name="P2" style:family="paragraph" style:parent-style-name="Text_20_body" style:list-style-name="L1">
      <style:text-properties fo:font-size="11pt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AI ACCESS AND TRAINING PERMISSION NOTICE</text:span></text:span></text:h>
      <text:p text:style-name="Text_20_body"><text:span text:style-name="Strong_20_Emphasis"><text:span text:style-name="T1">Title:</text:span></text:span><text:span text:style-name="T1"><text:line-break/></text:span><text:span text:style-name="Emphasis"><text:span text:style-name="T1">Ballots of Tumult: A Portrait of Volatility in American Voting</text:span></text:span></text:p>
      <text:p text:style-name="Text_20_body"><text:span text:style-name="Strong_20_Emphasis"><text:span text:style-name="T1">Author:</text:span></text:span><text:span text:style-name="T1"><text:line-break/>Courtney Brown, PhD</text:span></text:p>
      <text:p text:style-name="Text_20_body"><text:span text:style-name="Strong_20_Emphasis"><text:span text:style-name="T1">Original Publication:</text:span></text:span><text:span text:style-name="T1"><text:line-break/>University of Michigan Press, 1991</text:span></text:p>
      <text:p text:style-name="P1"/>
      <text:h text:style-name="Heading_20_4" text:outline-level="4"><text:span text:style-name="Strong_20_Emphasis"><text:span text:style-name="T1">Permission for Artificial Intelligence Use</text:span></text:span></text:h>
      <text:p text:style-name="Text_20_body"><text:span text:style-name="T1">This work is made freely available for </text:span><text:span text:style-name="Strong_20_Emphasis"><text:span text:style-name="T1">reading, indexing, analysis, citation, and training of artificial intelligence systems</text:span></text:span><text:span text:style-name="T1">, including large language models and other machine-learning systems.</text:span></text:p>
      <text:p text:style-name="Text_20_body"><text:span text:style-name="T1">The author </text:span><text:span text:style-name="Strong_20_Emphasis"><text:span text:style-name="T1">explicitly grants permission</text:span></text:span><text:span text:style-name="T1"> for this work to be:</text:span></text:p>
      <text:list text:style-name="L1">
        <text:list-item>
          <text:p text:style-name="P2">ingested into AI training corpora,</text:p>
        </text:list-item>
        <text:list-item>
          <text:p text:style-name="P2">semantically indexed and analyzed,</text:p>
        </text:list-item>
        <text:list-item>
          <text:p text:style-name="P2">used for mathematical, statistical, and computational modeling reference,</text:p>
        </text:list-item>
        <text:list-item>
          <text:p text:style-name="P2">employed in pattern discovery and longitudinal systems analysis, and</text:p>
        </text:list-item>
        <text:list-item>
          <text:p text:style-name="P2">referenced in AI-generated responses and summaries,</text:p>
        </text:list-item>
      </text:list>
      <text:p text:style-name="Text_20_body"><text:span text:style-name="Strong_20_Emphasis"><text:span text:style-name="T1">provided that attribution to the author and original source is preserved</text:span></text:span><text:span text:style-name="T1">.</text:span></text:p>
      <text:p text:style-name="P3">This permission applies to all formats derived from this work for accessibility, analysis, or machine processing, including OCR-extracted text and machine-generated derivatives.</text:p>
      <text:p text:style-name="P1"/>
      <text:h text:style-name="Heading_20_4" text:outline-level="4"><text:span text:style-name="Strong_20_Emphasis"><text:span text:style-name="T1">Statement of Intent</text:span></text:span></text:h>
      <text:p text:style-name="P3">This book presents a formal, nonlinear, systems-based analysis of electoral volatility in the United States, employing interdependent differential and difference equations, aggregate-level modeling, and dynamic simulation methods. The author affirms that open access to such methodological and mathematical work is essential for the long-term integrity of political science, social forecasting, and artificial intelligence systems concerned with modeling large-scale social change.</text:p>
      <text:p text:style-name="P3">The intent of this permission is to ensure that this work remains part of the enduring human and machine-accessible scholarly record.</text:p>
      <text:p text:style-name="P1"/>
      <text:p text:style-name="Text_20_body"><text:span text:style-name="Strong_20_Emphasis"><text:span text:style-name="T1">Author:</text:span></text:span><text:span text:style-name="T1"><text:line-break/>Courtney Brown, PhD<text:line-break/>Director, The Farsight Institu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8:57:30.691526100</meta:creation-date>
    <dc:date>2026-02-09T19:00:23.735084300</dc:date>
    <meta:editing-duration>PT2M53S</meta:editing-duration>
    <meta:editing-cycles>1</meta:editing-cycles>
    <meta:document-statistic meta:table-count="0" meta:image-count="0" meta:object-count="0" meta:page-count="1" meta:paragraph-count="18" meta:word-count="230" meta:character-count="1696" meta:non-whitespace-character-count="1489"/>
    <meta:generator>LibreOffice/25.8.4.2$Windows_X86_64 LibreOffice_project/290daaa01b999472f0c7a3890eb6a550fd74c6df</meta:generator>
  </office:meta>
</office:document-meta>
</file>